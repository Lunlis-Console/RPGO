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color="#fafafa" loext:opacity="100%" style:font-name="Arial" fo:font-size="9.75pt" fo:font-weight="bold" officeooo:rsid="0013bc5c" officeooo:paragraph-rsid="0013bc5c"/>
    </style:style>
    <style:style style:name="P2" style:family="paragraph" style:parent-style-name="Heading_20_3">
      <style:text-properties fo:color="#fafafa" loext:opacity="100%" style:font-name="Arial" fo:font-size="9.75pt" fo:font-weight="bold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000000"/>
      <style:text-properties officeooo:paragraph-rsid="0015516f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000000"/>
      <style:text-properties style:font-name="Arial" officeooo:rsid="0014c4e2" officeooo:paragraph-rsid="0015516f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000000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000000"/>
      <style:text-properties style:font-name="Arial" officeooo:rsid="0014c4e2" officeooo:paragraph-rsid="001659b6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000000"/>
      <style:text-properties style:font-name="Arial" officeooo:rsid="0014c4e2" officeooo:paragraph-rsid="0016dddf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000000"/>
      <style:text-properties style:font-name="Arial" officeooo:rsid="0014c4e2" officeooo:paragraph-rsid="00185b9c"/>
    </style:style>
    <style:style style:name="P9" style:family="paragraph" style:parent-style-name="Heading_20_3">
      <style:paragraph-properties fo:margin-left="0cm" fo:margin-right="0cm" fo:margin-top="0.529cm" fo:margin-bottom="0.212cm" style:contextual-spacing="false" style:line-height-at-least="0.503cm" fo:text-indent="0cm" style:auto-text-indent="false" fo:padding="0.049cm" fo:border="0.06pt solid #000000"/>
      <style:text-properties fo:color="#fafafa" loext:opacity="100%" style:font-name="Arial" fo:font-size="9.75pt" fo:font-weight="bold"/>
    </style:style>
    <style:style style:name="P10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000000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000000"/>
      <style:text-properties style:font-name="Arial" officeooo:rsid="0014c4e2" officeooo:paragraph-rsid="001bbe48"/>
    </style:style>
    <style:style style:name="P12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000000"/>
      <style:text-properties officeooo:paragraph-rsid="001bbe48"/>
    </style:style>
    <style:style style:name="P13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000000"/>
      <style:text-properties style:font-name="Arial" officeooo:rsid="001453b1" officeooo:paragraph-rsid="001bbe48"/>
    </style:style>
    <style:style style:name="P14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000000"/>
      <style:text-properties style:font-name="Arial" officeooo:rsid="001453b1"/>
    </style:style>
    <style:style style:name="P15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.049cm" fo:border="0.06pt solid #000000"/>
    </style:style>
    <style:style style:name="P16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.049cm" fo:border="0.06pt solid #000000"/>
    </style:style>
    <style:style style:name="P17" style:family="paragraph" style:parent-style-name="Standard">
      <style:text-properties style:font-name="Arial"/>
    </style:style>
    <style:style style:name="P18" style:family="paragraph" style:parent-style-name="Standard">
      <style:text-properties style:font-name="Arial" officeooo:rsid="001d6be0" officeooo:paragraph-rsid="001d6be0"/>
    </style:style>
    <style:style style:name="P19" style:family="paragraph" style:parent-style-name="Standard">
      <style:text-properties style:font-name="Arial" fo:language="en" fo:country="US" officeooo:rsid="001d6be0" officeooo:paragraph-rsid="001d6be0"/>
    </style:style>
    <style:style style:name="P20" style:family="paragraph" style:parent-style-name="Text_20_body">
      <style:text-properties style:font-name="Arial" fo:language="en" fo:country="US" officeooo:rsid="001d6be0" officeooo:paragraph-rsid="001d6be0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.049cm" fo:border="0.06pt solid #000000"/>
      <style:text-properties style:font-name="Arial" fo:language="en" fo:country="US" officeooo:rsid="001d6be0"/>
    </style:style>
    <style:style style:name="T1" style:family="text">
      <style:text-properties officeooo:rsid="0016dddf"/>
    </style:style>
    <style:style style:name="T2" style:family="text">
      <style:text-properties fo:color="#fafafa" loext:opacity="100%" style:font-name="Arial" fo:font-weight="bold" loext:padding="0.049cm" loext:border="0.06pt solid #000000"/>
    </style:style>
    <style:style style:name="T3" style:family="text">
      <style:text-properties style:font-name="Arial"/>
    </style:style>
    <style:style style:name="T4" style:family="text">
      <style:text-properties fo:language="en" fo:country="US"/>
    </style:style>
    <style:style style:name="T5" style:family="text">
      <style:text-properties fo:color="#fafafa" loext:opacity="100%" fo:font-weight="bold" loext:padding="0.049cm" loext:border="0.06pt solid #000000"/>
    </style:style>
    <style:style style:name="T6" style:family="text">
      <style:text-properties fo:color="#fafafa" loext:opacity="100%" fo:font-weight="bold" loext:padding-left="0.106cm" loext:padding-right="0cm" loext:padding-top="0.053cm" loext:padding-bottom="0.053cm" loext:border-left="0.06pt solid #000000" loext:border-right="none" loext:border-top="0.06pt solid #000000" loext:border-bottom="0.06pt solid #000000"/>
    </style:style>
    <style:style style:name="T7" style:family="text">
      <style:text-properties fo:color="#fafafa" loext:opacity="100%" fo:font-family="ui-monospace, SFMono-Regular, Menlo, Monaco, Consolas, 'Liberation Mono', 'Courier New', monospace" fo:font-weight="bold" loext:padding-left="0.106cm" loext:padding-right="0cm" loext:padding-top="0.053cm" loext:padding-bottom="0.053cm" loext:border-left="0.06pt solid #000000" loext:border-right="none" loext:border-top="0.06pt solid #000000" loext:border-bottom="0.06pt solid #000000"/>
    </style:style>
    <style:style style:name="T8" style:family="text">
      <style:text-properties fo:color="#a2bcff" loext:opacity="100%" fo:font-family="ui-monospace, SFMono-Regular, Menlo, Monaco, Consolas, 'Liberation Mono', 'Courier New', monospace" fo:font-weight="bold" loext:padding-left="0.106cm" loext:padding-right="0cm" loext:padding-top="0.053cm" loext:padding-bottom="0.053cm" loext:border-left="0.06pt solid #000000" loext:border-right="none" loext:border-top="0.06pt solid #000000" loext:border-bottom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НЕ ИСПОЛЬЗОВАТЬ <text:span text:style-name="T1">НЕМОТРОН</text:span>!!!!</text:h>
      <text:h text:style-name="P2" text:outline-level="3"/>
      <text:h text:style-name="P2" text:outline-level="3">1. Тех. фундамент (1-2 недели)</text:h>
      <text:list text:style-name="L1">
        <text:list-item>
          <text:p text:style-name="P3"><text:span text:style-name="Strong_20_Emphasis"><text:span text:style-name="T2">Heartbeat + реконнект</text:span></text:span><text:span text:style-name="T3"> — иначе игроки падают при лагах </text:span></text:p>
          <text:p text:style-name="P4">(С ПЕРЕМЕННЫМ УСПЕХОМ ОК)</text:p>
        </text:list-item>
        <text:list-item>
          <text:p text:style-name="P5"><text:span text:style-name="Strong_20_Emphasis"><text:span text:style-name="T2">Миграции БД</text:span></text:span><text:span text:style-name="T3"> (FluentMigrator) — чтобы не ломать сохранения при схемах</text:span></text:p>
          <text:p text:style-name="P6">(ОК)</text:p>
        </text:list-item>
        <text:list-item>
          <text:p text:style-name="P5"><text:span text:style-name="Strong_20_Emphasis"><text:span text:style-name="T2">Логирование (Serilog) + метрики</text:span></text:span><text:span text:style-name="T3"> — видимость того, что на сервере</text:span></text:p>
          <text:p text:style-name="P7">(ОК)</text:p>
        </text:list-item>
        <text:list-item>
          <text:p text:style-name="P5"><text:span text:style-name="Strong_20_Emphasis"><text:span text:style-name="T2">Unit-тесты</text:span></text:span><text:span text:style-name="T3"> на критическую логику (бой, квесты, инвентарь)</text:span></text:p>
          <text:p text:style-name="P8">(ОК)</text:p>
        </text:list-item>
      </text:list>
      <text:h text:style-name="P9" text:outline-level="3">2. Мультиигрок (2-3 недели)</text:h>
      <text:list text:style-name="L2">
        <text:list-item>
          <text:p text:style-name="P10"><text:span text:style-name="Strong_20_Emphasis"><text:span text:style-name="T2">Party система</text:span></text:span><text:span text:style-name="T3"> — лут, UI</text:span></text:p>
          <text:p text:style-name="P11">(ОК)</text:p>
        </text:list-item>
        <text:list-item>
          <text:p text:style-name="P12"><text:span text:style-name="Strong_20_Emphasis"><text:span text:style-name="T2">Торговля между игроками</text:span></text:span><text:span text:style-name="T3"> — окно обмена, </text:span></text:p>
          <text:p text:style-name="P13"><text:span text:style-name="T3"/></text:p>
        </text:list-item>
        <text:list-item>
          <text:p text:style-name="P13">аукцион</text:p>
          <text:p text:style-name="P14"/>
        </text:list-item>
        <text:list-item>
          <text:p text:style-name="P10"><text:span text:style-name="Strong_20_Emphasis"><text:span text:style-name="T2">PvP флаги/зоны</text:span></text:span><text:span text:style-name="T3"> — дуэли, открытый PvP</text:span></text:p>
        </text:list-item>
        <text:list-item>
          <text:p text:style-name="P10"><text:span text:style-name="Strong_20_Emphasis"><text:span text:style-name="T2">Гильдии</text:span></text:span><text:span text:style-name="T3"> — создание, ранки, банк, чат</text:span></text:p>
        </text:list-item>
      </text:list>
      <text:h text:style-name="P9" text:outline-level="3">3. Контент (постоянно)</text:h>
      <text:list text:style-name="L3">
        <text:list-item>
          <text:p text:style-name="P15"><text:span text:style-name="Strong_20_Emphasis"><text:span text:style-name="T2">Редактор карт</text:span></text:span><text:span text:style-name="T3"> (тайловый) — иначе руками в JSON не будешь делать</text:span></text:p>
        </text:list-item>
        <text:list-item>
          <text:p text:style-name="P15"><text:span text:style-name="Strong_20_Emphasis"><text:span text:style-name="T2">Баланс</text:span></text:span><text:span text:style-name="T3"> — таблицы мобов, предметов, квестов в CSV/JSON + загрузчик</text:span></text:p>
        </text:list-item>
        <text:list-item>
          <text:p text:style-name="P15"><text:span text:style-name="Strong_20_Emphasis"><text:span text:style-name="T2">Больше скиллов/классов</text:span></text:span><text:span text:style-name="T3"> — дерево талантов, специализации</text:span></text:p>
        </text:list-item>
      </text:list>
      <text:h text:style-name="P9" text:outline-level="3">4. Инфраструктура (когда будут игроки)</text:h>
      <text:list text:style-name="L4">
        <text:list-item>
          <text:p text:style-name="P16"><text:span text:style-name="Strong_20_Emphasis"><text:span text:style-name="T2">CI/CD</text:span></text:span><text:span text:style-name="T3"> (GitHub Actions) — сборка, тесты, артефакты</text:span></text:p>
        </text:list-item>
        <text:list-item>
          <text:p text:style-name="P16"><text:span text:style-name="Strong_20_Emphasis"><text:span text:style-name="T2">Автоапдейтер</text:span></text:span><text:span text:style-name="T3"> — как обсуждали</text:span></text:p>
        </text:list-item>
        <text:list-item>
          <text:p text:style-name="P16"><text:span text:style-name="Strong_20_Emphasis"><text:span text:style-name="T2">Админ-панель</text:span></text:span><text:span text:style-name="T3"> (веб или в игре) — бан, кик, спавн, статистика</text:span>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Замечения к переходу на <text:span text:style-name="T4">avalonia</text:span></text:p>
      <text:p text:style-name="P19"/>
      <text:p text:style-name="P20"><text:span text:style-name="Strong_20_Emphasis"><text:span text:style-name="T5">1. </text:span></text:span><text:span text:style-name="Strong_20_Emphasis"><text:span text:style-name="Source_20_Text"><text:span text:style-name="T6">FormattedText</text:span></text:span></text:span><text:span text:style-name="Strong_20_Emphasis"><text:span text:style-name="T5"> deprecated</text:span></text:span> (<text:span text:style-name="Source_20_Text"><text:span text:style-name="T7">MapView.cs:256,279,284,...</text:span></text:span>) Avalonia 11+ считает <text:span text:style-name="Source_20_Text"><text:span text:style-name="T7">FormattedText</text:span></text:span> устаревшим. Нужно перейти на <text:span text:style-name="Source_20_Text"><text:span text:style-name="T7">TextLayout</text:span></text:span> или рендер через <text:span text:style-name="Source_20_Text"><text:span text:style-name="T7">GlyphRun</text:span></text:span>. Пока работает, но в будущих версиях может сломаться.</text:p>
      <text:p text:style-name="P21"><text:span text:style-name="Strong_20_Emphasis"><text:span text:style-name="T5">2. </text:span></text:span><text:span text:style-name="Strong_20_Emphasis"><text:span text:style-name="Source_20_Text"><text:span text:style-name="T6">UniformGrid</text:span></text:span></text:span><text:span text:style-name="Strong_20_Emphasis"><text:span text:style-name="T5"> для хотбара</text:span></text:span> (<text:span text:style-name="Source_20_Text"><text:span text:style-name="T7">MainWindow.axaml:126</text:span></text:span>) <text:span text:style-name="Source_20_Text"><text:span text:style-name="T7">UniformGrid</text:span></text:span> в Avalonia может вести себя иначе — ячейки растягиваются неравномерно при изменении размера окна. В WinForms <text:span text:style-name="Source_20_Text"><text:span text:style-name="T7">TableLayoutPanel</text:span></text:span> с фиксированными колонками работал предсказуемее.</text:p>
      <text:p text:style-name="P21"><text:span text:style-name="Strong_20_Emphasis"><text:span text:style-name="T5">3. Нет </text:span></text:span><text:span text:style-name="Strong_20_Emphasis"><text:span text:style-name="Source_20_Text"><text:span text:style-name="T6">DataBinding</text:span></text:span></text:span><text:span text:style-name="Strong_20_Emphasis"><text:span text:style-name="T5"> в стилях окон</text:span></text:span> (<text:span text:style-name="Source_20_Text"><text:span text:style-name="T8">StatusWindow.axaml.cs</text:span></text:span>, <text:span text:style-name="Source_20_Text"><text:span text:style-name="T8">SkillsWindow.axaml.cs</text:span></text:span> и др.) Почти все окна строятся полностью в code-behind без AXAML. Это работает, но противоречит MVVM-подходу Avalonia и усложнит поддержку. WinForms так и работал, но в Avalonia это упущенный потенциал.</text:p>
      <text:p text:style-name="P21"><text:span text:style-name="Strong_20_Emphasis"><text:span text:style-name="T5">4. </text:span></text:span><text:span text:style-name="Strong_20_Emphasis"><text:span text:style-name="Source_20_Text"><text:span text:style-name="T6">_ = _client.SendAsync(...)</text:span></text:span></text:span><text:span text:style-name="Strong_20_Emphasis"><text:span text:style-name="T5"> без await</text:span></text:span> (<text:span text:style-name="Source_20_Text"><text:span text:style-name="T8">MainWindow.axaml.cs</text:span></text:span> всюду) Fire-and-forget вызовы <text:span text:style-name="Source_20_Text"><text:span text:style-name="T7">SendAsync</text:span></text:span> могут проглатывать ошибки сети. В WinForms это тоже было, но там хотя бы <text:span text:style-name="Source_20_Text"><text:span text:style-name="T7">Invoke</text:span></text:span> мог выбросить исключение visible.</text:p>
      <text:p text:style-name="P21"><text:span text:style-name="Strong_20_Emphasis"><text:span text:style-name="T5">5. Drag &amp; Drop не реализован</text:span></text:span> (<text:span text:style-name="Source_20_Text"><text:span text:style-name="T8">InventoryWindow.axaml.cs</text:span></text:span>) В WinForms <text:span text:style-name="Source_20_Text"><text:span text:style-name="T7">HotbarControl</text:span></text:span> поддерживал drag &amp; drop предметов на хотбар. В Avalonia окне инвентаря есть <text:span text:style-name="Source_20_Text"><text:span text:style-name="T7">CtxHotbar</text:span></text:span> через контекстное меню, но самого drag &amp; drop нет.</text:p>
      <text:p text:style-name="P21"><text:span text:style-name="Strong_20_Emphasis"><text:span text:style-name="T5">6. </text:span></text:span><text:span text:style-name="Strong_20_Emphasis"><text:span text:style-name="Source_20_Text"><text:span text:style-name="T6">DispatcherTimer</text:span></text:span></text:span><text:span text:style-name="Strong_20_Emphasis"><text:span text:style-name="T5"> вместо </text:span></text:span><text:span text:style-name="Strong_20_Emphasis"><text:span text:style-name="Source_20_Text"><text:span text:style-name="T7">Composition</text:span></text:span></text:span> (<text:span text:style-name="Source_20_Text"><text:span text:style-name="T7">MapView.cs:56</text:span></text:span>) Для рендера карты используется <text:span text:style-name="Source_20_Text"><text:span text:style-name="T7">DispatcherTimer</text:span></text:span> (33ms). Avalonia имеет более эффективный механизм через <text:span text:style-name="Source_20_Text"><text:span text:style-name="T7">Composition</text:span></text:span> или <text:span text:style-name="Source_20_Text"><text:span text:style-name="T7">InvalidateVisual()</text:span></text:span> с <text:span text:style-name="Source_20_Text"><text:span text:style-name="T7">RenderLoop</text:span></text:span>. Текущий подход рабочий, но не оптимален.</text:p>
      <text:p text:style-name="P21"><text:span text:style-name="Strong_20_Emphasis"><text:span text:style-name="T5">7. </text:span></text:span><text:span text:style-name="Strong_20_Emphasis"><text:span text:style-name="Source_20_Text"><text:span text:style-name="T6">PasswordBox</text:span></text:span></text:span><text:span text:style-name="Strong_20_Emphasis"><text:span text:style-name="T5"> без </text:span></text:span><text:span text:style-name="Strong_20_Emphasis"><text:span text:style-name="Source_20_Text"><text:span text:style-name="T7">RevealButton</text:span></text:span></text:span> (<text:span text:style-name="Source_20_Text"><text:span text:style-name="T7">MainWindow.axaml:80</text:span></text:span>) <text:span text:style-name="Source_20_Text"><text:span text:style-name="T7">PasswordChar="*"</text:span></text:span> работает, но в Avalonia FluentTheme нативный <text:span text:style-name="Source_20_Text"><text:span text:style-name="T7">PasswordBox</text:span></text:span> выглядит иначе. Стоит проверить, что UX пароля корректен.</text:p>
      <text:p text:style-name="P21"><text:span text:style-name="Strong_20_Emphasis"><text:span text:style-name="T5">8. </text:span></text:span><text:span text:style-name="Strong_20_Emphasis"><text:span text:style-name="Source_20_Text"><text:span text:style-name="T6">ShowDialog</text:span></text:span></text:span><text:span text:style-name="Strong_20_Emphasis"><text:span text:style-name="T5"> vs </text:span></text:span><text:span text:style-name="Strong_20_Emphasis"><text:span text:style-name="Source_20_Text"><text:span text:style-name="T7">Show</text:span></text:span></text:span> Некоторые окна используют <text:span text:style-name="Source_20_Text"><text:span text:style-name="T7">Show()</text:span></text:span> вместо <text:span text:style-name="Source_20_Text"><text:span text:style-name="T7">ShowDialog()</text:span></text:span> ( LootWindow:521, TradeWindow:133). В WinForms было аналогично, но в Avalonia <text:span text:style-name="Source_20_Text"><text:span text:style-name="T7">Show()</text:span></text:span> не блокирует родителя, что может привести к множественному открытию одного окна.</text:p>
      <text:p text:style-name="P21"><text:span text:style-name="Strong_20_Emphasis"><text:span text:style-name="T5">9. Нет </text:span></text:span><text:span text:style-name="Strong_20_Emphasis"><text:span text:style-name="Source_20_Text"><text:span text:style-name="T6">PointerWheelChanged</text:span></text:span></text:span><text:span text:style-name="Strong_20_Emphasis"><text:span text:style-name="T5"> для зума карты</text:span></text:span> WinForms <text:span text:style-name="Source_20_Text"><text:span text:style-name="T7">MapControl</text:span></text:span> поддерживал скролл колёсиком. В <text:span text:style-name="Source_20_Text"><text:span text:style-name="T8">MapView.cs</text:span></text:span> обрабатывается только <text:span text:style-name="Source_20_Text"><text:span text:style-name="T7">OnPointerPressed</text:span></text:span> — зума нет.</text:p>
      <text:p text:style-name="P21"><text:span text:style-name="Strong_20_Emphasis"><text:span text:style-name="T5">10. </text:span></text:span><text:span text:style-name="Strong_20_Emphasis"><text:span text:style-name="Source_20_Text"><text:span text:style-name="T6">Items.RemoveAt(0)</text:span></text:span></text:span><text:span text:style-name="Strong_20_Emphasis"><text:span text:style-name="T5"> в чате</text:span></text:span> (<text:span text:style-name="Source_20_Text"><text:span text:style-name="T7">MainWindow.axaml.cs:539</text:span></text:span>) При лимите 200 сообщений удаление из начала <text:span text:style-name="Source_20_Text"><text:span text:style-name="T7">ObservableCollection</text:span></text:span> — O(n) операция. В WinForms <text:span text:style-name="Source_20_Text"><text:span text:style-name="T7">ListBox</text:span></text:span> с <text:span text:style-name="Source_20_Text"><text:span text:style-name="T7">DrawMode.OwnerDrawFixed</text:span></text:span> был быстрее. Для 200 элементов это не критично, но при росте лога начнёт тормозить.</text:p>
      <text:p text:style-name="P19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7T22:31:27.323793100</meta:creation-date>
    <dc:date>2026-07-18T22:58:59.988796800</dc:date>
    <meta:editing-duration>PT9H5M59S</meta:editing-duration>
    <meta:editing-cycles>10</meta:editing-cycles>
    <meta:generator>LibreOffice/26.2.4.2$Windows_X86_64 LibreOffice_project/0229ac93fcf0d7cbc6376066c6f35021cef002dc</meta:generator>
    <meta:document-statistic meta:table-count="0" meta:image-count="0" meta:object-count="0" meta:page-count="3" meta:paragraph-count="38" meta:word-count="434" meta:character-count="3194" meta:non-whitespace-character-count="2800"/>
  </office:meta>
</office:document-meta>
</file>